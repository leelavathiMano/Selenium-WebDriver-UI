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4" style:parent-style-name="DefaultParagraphFont" style:family="text">
      <style:text-properties fo:font-weight="bold" style:font-weight-asian="bold" fo:font-size="18pt" style:font-size-asian="18pt" style:font-size-complex="18pt"/>
    </style:style>
  </office:automatic-styles>
  <office:body>
    <office:text text:use-soft-page-breaks="true">
      <text:p text:style-name="P1"><text:span text:style-name="T2">Emp ID:<text:s/></text:span></text:p>
      <text:p text:style-name="Standard"><text:span text:style-name="T3">Emp Name:</text:span><text:bookmark-start text:name="Bookmark"/><text:bookmark-end text:name="Bookmark"/></text:p>
      <text:p text:style-name="Standard"><text:span text:style-name="T4">Location Confirmation</text:span></text:p>
      <text:p text:style-name="Standard">All Preferred<text:s/>Locations:- <text:s/></text:p>
      <text:p text:style-name="Standard">Willingness to Work from office:-<text:s/></text:p>
      <text:p text:style-name="Standard">Willingness to Relocate:-<text:s/></text:p>
      <text:p text:style-name="Standard">Concerns/Queries:-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onisha Vel</meta:initial-creator>
    <dc:creator>Rajdeep Chettri</dc:creator>
    <meta:creation-date>2024-11-21T05:01:00Z</meta:creation-date>
    <dc:date>2024-11-21T05:01:00Z</dc:date>
    <meta:template xlink:href="Normal" xlink:type="simple"/>
    <meta:editing-cycles>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22" meta:character-count="151" meta:row-count="1" meta:non-whitespace-character-count="130"/>
  </office:meta>
</office:document-meta>
</file>